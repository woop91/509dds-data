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Pro-Regular" svg:font-family="MinionPro-Regular"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26697d" officeooo:paragraph-rsid="00222188"/>
    </style:style>
    <style:style style:name="P2" style:family="paragraph" style:parent-style-name="Standard">
      <style:text-properties officeooo:rsid="0026697d" officeooo:paragraph-rsid="0026697d"/>
    </style:style>
    <style:style style:name="P3" style:family="paragraph" style:parent-style-name="Standard">
      <style:text-properties officeooo:rsid="00209803" officeooo:paragraph-rsid="0026697d"/>
    </style:style>
    <style:style style:name="P4" style:family="paragraph" style:parent-style-name="Standard">
      <style:text-properties officeooo:rsid="0024189c" officeooo:paragraph-rsid="0024189c"/>
    </style:style>
    <style:style style:name="P5" style:family="paragraph" style:parent-style-name="Standard">
      <style:text-properties officeooo:rsid="0024189c" officeooo:paragraph-rsid="0026697d"/>
    </style:style>
    <style:style style:name="P6" style:family="paragraph" style:parent-style-name="Standard">
      <style:text-properties fo:font-weight="bold" officeooo:rsid="00222188" officeooo:paragraph-rsid="0024189c" style:font-weight-asian="bold" style:font-weight-complex="bold"/>
    </style:style>
    <style:style style:name="P7" style:family="paragraph" style:parent-style-name="Standard">
      <style:text-properties officeooo:rsid="001e992a" officeooo:paragraph-rsid="0024189c"/>
    </style:style>
    <style:style style:name="P8" style:family="paragraph" style:parent-style-name="Standard">
      <style:text-properties officeooo:rsid="00209803" officeooo:paragraph-rsid="0024189c"/>
    </style:style>
    <style:style style:name="P9" style:family="paragraph" style:parent-style-name="Standard">
      <style:text-properties officeooo:rsid="00212ce9" officeooo:paragraph-rsid="0024189c"/>
    </style:style>
    <style:style style:name="P10" style:family="paragraph" style:parent-style-name="Standard">
      <style:text-properties officeooo:rsid="00222188" officeooo:paragraph-rsid="0026697d"/>
    </style:style>
    <style:style style:name="P11" style:family="paragraph" style:parent-style-name="Standard">
      <style:text-properties officeooo:rsid="00222188" officeooo:paragraph-rsid="00222188"/>
    </style:style>
    <style:style style:name="P12" style:family="paragraph" style:parent-style-name="Standard">
      <style:text-properties fo:font-weight="bold" officeooo:rsid="00222188" officeooo:paragraph-rsid="00222188" style:font-weight-asian="bold" style:font-weight-complex="bold"/>
    </style:style>
    <style:style style:name="P13" style:family="paragraph" style:parent-style-name="Standard">
      <style:text-properties officeooo:rsid="00212ce9" officeooo:paragraph-rsid="00222188"/>
    </style:style>
    <style:style style:name="P14" style:family="paragraph" style:parent-style-name="Standard">
      <style:text-properties officeooo:rsid="0024189c" officeooo:paragraph-rsid="0025092b"/>
    </style:style>
    <style:style style:name="P15" style:family="paragraph" style:parent-style-name="Standard">
      <style:text-properties officeooo:rsid="001e992a" officeooo:paragraph-rsid="001e992a"/>
    </style:style>
    <style:style style:name="P16" style:family="paragraph" style:parent-style-name="Standard">
      <style:text-properties officeooo:rsid="00209803" officeooo:paragraph-rsid="00209803"/>
    </style:style>
    <style:style style:name="P17" style:family="paragraph" style:parent-style-name="Standard">
      <style:text-properties officeooo:rsid="001e002e" officeooo:paragraph-rsid="001e002e"/>
    </style:style>
    <style:style style:name="P18" style:family="paragraph" style:parent-style-name="Standard">
      <style:text-properties style:text-underline-style="solid" style:text-underline-width="auto" style:text-underline-color="font-color" officeooo:rsid="001a622f" officeooo:paragraph-rsid="001a622f"/>
    </style:style>
    <style:style style:name="P19" style:family="paragraph" style:parent-style-name="Standard">
      <style:text-properties officeooo:rsid="001a622f" officeooo:paragraph-rsid="001a622f"/>
    </style:style>
    <style:style style:name="P20" style:family="paragraph" style:parent-style-name="Standard">
      <style:text-properties officeooo:rsid="000f5424" officeooo:paragraph-rsid="000f5424"/>
    </style:style>
    <style:style style:name="P21" style:family="paragraph" style:parent-style-name="Standard">
      <style:text-properties officeooo:rsid="00171069" officeooo:paragraph-rsid="001a622f"/>
    </style:style>
    <style:style style:name="P22" style:family="paragraph" style:parent-style-name="Standard">
      <style:paragraph-properties fo:margin-left="0in" fo:margin-right="0in" fo:text-indent="0in" style:auto-text-indent="false"/>
    </style:style>
    <style:style style:name="P23" style:family="paragraph" style:parent-style-name="Standard">
      <style:text-properties officeooo:rsid="00147a94" officeooo:paragraph-rsid="001a622f"/>
    </style:style>
    <style:style style:name="P24" style:family="paragraph" style:parent-style-name="Standard">
      <style:text-properties officeooo:rsid="000f5424" officeooo:paragraph-rsid="001a622f"/>
    </style:style>
    <style:style style:name="P25" style:family="paragraph" style:parent-style-name="Standard">
      <style:paragraph-properties fo:margin-left="0in" fo:margin-right="0in" fo:text-indent="0in" style:auto-text-indent="false"/>
      <style:text-properties officeooo:paragraph-rsid="000f5424"/>
    </style:style>
    <style:style style:name="P26" style:family="paragraph" style:parent-style-name="Standard">
      <style:paragraph-properties fo:margin-left="0in" fo:margin-right="0in" fo:text-indent="0in" style:auto-text-indent="false"/>
      <style:text-properties officeooo:rsid="000f5424" officeooo:paragraph-rsid="000f5424"/>
    </style:style>
    <style:style style:name="P27" style:family="paragraph" style:parent-style-name="Standard">
      <style:text-properties officeooo:rsid="00147a94" officeooo:paragraph-rsid="00147a94"/>
    </style:style>
    <style:style style:name="P28" style:family="paragraph" style:parent-style-name="Standard">
      <style:text-properties officeooo:rsid="00171069" officeooo:paragraph-rsid="0016136b"/>
    </style:style>
    <style:style style:name="P29" style:family="paragraph" style:parent-style-name="Standard">
      <style:text-properties officeooo:rsid="00171069" officeooo:paragraph-rsid="00171069"/>
    </style:style>
    <style:style style:name="P30" style:family="paragraph" style:parent-style-name="Standard">
      <style:text-properties officeooo:rsid="000f8c6e" officeooo:paragraph-rsid="000f8c6e"/>
    </style:style>
    <style:style style:name="P31" style:family="paragraph" style:parent-style-name="Standard">
      <style:paragraph-properties fo:text-align="start" style:justify-single-word="false"/>
      <style:text-properties fo:font-weight="normal" style:font-weight-asian="normal" style:font-weight-complex="normal"/>
    </style:style>
    <style:style style:name="P32" style:family="paragraph" style:parent-style-name="Standard">
      <style:text-properties style:font-name="Times New Roman" fo:font-size="10pt" fo:font-weight="normal" officeooo:rsid="00171069" officeooo:paragraph-rsid="00171069" style:font-size-asian="10pt" style:font-weight-asian="normal" style:font-weight-complex="normal"/>
    </style:style>
    <style:style style:name="P33" style:family="paragraph" style:parent-style-name="Standard">
      <style:paragraph-properties fo:text-align="start" style:justify-single-word="false"/>
      <style:text-properties fo:color="#000000" loext:opacity="100%" style:font-name="MinionPro-Regular" fo:font-size="12pt" officeooo:rsid="00171069" style:font-size-asian="12pt"/>
    </style:style>
    <style:style style:name="P34" style:family="paragraph" style:parent-style-name="Standard">
      <style:text-properties fo:color="#414141" loext:opacity="100%" style:font-name="MinionPro-Regular" fo:font-size="12pt" officeooo:rsid="00171069" officeooo:paragraph-rsid="00171069" style:font-size-asian="12pt"/>
    </style:style>
    <style:style style:name="P35" style:family="paragraph" style:parent-style-name="Standard">
      <style:text-properties officeooo:rsid="00101344" officeooo:paragraph-rsid="00101344"/>
    </style:style>
    <style:style style:name="P36" style:family="paragraph" style:parent-style-name="Standard">
      <style:text-properties officeooo:rsid="002c25ec" officeooo:paragraph-rsid="002c25ec"/>
    </style:style>
    <style:style style:name="T1" style:family="text">
      <style:text-properties officeooo:rsid="00222188"/>
    </style:style>
    <style:style style:name="T2" style:family="text">
      <style:text-properties officeooo:rsid="00209803"/>
    </style:style>
    <style:style style:name="T3" style:family="text">
      <style:text-properties officeooo:rsid="0024189c"/>
    </style:style>
    <style:style style:name="T4" style:family="text">
      <style:text-properties style:text-position="super 58%"/>
    </style:style>
    <style:style style:name="T5" style:family="text">
      <style:text-properties officeooo:rsid="001c0525"/>
    </style:style>
    <style:style style:name="T6" style:family="text">
      <style:text-properties officeooo:rsid="00188203"/>
    </style:style>
    <style:style style:name="T7" style:family="text">
      <style:text-properties style:font-name="Times New Roman" fo:font-size="10pt" fo:font-weight="bold" style:font-size-asian="10pt" style:font-weight-asian="bold"/>
    </style:style>
    <style:style style:name="T8" style:family="text">
      <style:text-properties style:font-name="Times New Roman" fo:font-size="10pt" style:font-size-asian="10pt"/>
    </style:style>
    <style:style style:name="T9" style:family="text">
      <style:text-properties fo:color="#414141" loext:opacity="100%" style:font-name="MinionPro-Regular" fo:font-size="12pt" style:font-size-asian="12pt"/>
    </style:style>
    <style:style style:name="T10" style:family="text">
      <style:text-properties officeooo:rsid="00147a94"/>
    </style:style>
    <style:style style:name="T11" style:family="text">
      <style:text-properties officeooo:rsid="001013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2">I would also like to invite you all to join my private discord channel.</text:p>
      <text:p text:style-name="P2"/>
      <text:p text:style-name="P3">A link to join a private discord channel where you can share your thoughts and opinion.</text:p>
      <text:p text:style-name="P4"/>
      <text:p text:style-name="P4">Please note: this email is being sent by (()) as fellow union members and Stewards, NOT from the Union Chapter.</text:p>
      <text:p text:style-name="P4"/>
      <text:p text:style-name="P4"/>
      <text:p text:style-name="P5">A note on privacy and confidentiality.</text:p>
      <text:p text:style-name="Standard"/>
      <text:p text:style-name="P6">Currently:</text:p>
      <text:p text:style-name="P7">Job descriptions for all employment positions at D.D.S.</text:p>
      <text:p text:style-name="P7">Official copy of the union contract </text:p>
      <text:p text:style-name="P7">A <text:span text:style-name="T1">list w/ contact information of all stewards</text:span></text:p>
      <text:p text:style-name="P7">A <text:s/>shortened D.D.S. <text:s/>only version of the union contract with many enhancement to its functionality</text:p>
      <text:p text:style-name="P7"/>
      <text:p text:style-name="P7"/>
      <text:p text:style-name="P7">All <text:span text:style-name="T2">employee </text:span>forms <text:span text:style-name="T2">can now be completed on your computer</text:span></text:p>
      <text:p text:style-name="P8">The DDS contract table of content now has hyperlinks – click on the chapter to be taken there</text:p>
      <text:p text:style-name="P8">An expanded table has been added w/ hyperlinks</text:p>
      <text:p text:style-name="P8">The search function has been enhance to better provide results.</text:p>
      <text:p text:style-name="P8">Better functionality on mobile devices.</text:p>
      <text:p text:style-name="P8">bookmarks have also been added</text:p>
      <text:p text:style-name="P8">Quick links have been added to quickly move around the document</text:p>
      <text:p text:style-name="P8">you can now click on references to be taken to the actual website for said reference.</text:p>
      <text:p text:style-name="P8">General appearance enhancement<text:span text:style-name="T3">s</text:span></text:p>
      <text:p text:style-name="P8">Job descriptions for Stewards and elected <text:span text:style-name="T3">union </text:span>official<text:span text:style-name="T3">s</text:span></text:p>
      <text:p text:style-name="P8">Steward election information </text:p>
      <text:p text:style-name="P9">Union Bylaws</text:p>
      <text:p text:style-name="Standard"/>
      <text:p text:style-name="Standard"/>
      <text:p text:style-name="Standard"/>
      <text:p text:style-name="Standard"/>
      <text:p text:style-name="P10">Upcoming: </text:p>
      <text:p text:style-name="P2"/>
      <text:p text:style-name="P2">****PLEASE NOTE, NO FURTHER EMAILS WILL BE SENT TO ANY SSA EMAIL EMAIL ADDRESS. TO STAY INFORMED, PLEASE PROVIDE YOUR PERSONAL EMAIL..****((()))</text:p>
      <text:p text:style-name="P11"/>
      <text:p text:style-name="P11"/>
      <text:p text:style-name="P12">By July 21<text:span text:style-name="T4">st</text:span></text:p>
      <text:p text:style-name="P11">An outline of events leading to the current negotiations or lack there of w/ management.</text:p>
      <text:p text:style-name="P11">An update on the picketing proposal by stewards</text:p>
      <text:p text:style-name="P11"/>
      <text:p text:style-name="P12">by Mid August</text:p>
      <text:p text:style-name="P11">Surveys – w/ results for all to see</text:p>
      <text:p text:style-name="P11">Better understanding of union finances and documents request</text:p>
      <text:p text:style-name="P11">Better understanding of MassAbility and the role of DDS. </text:p>
      <text:p text:style-name="P7"><text:soft-page-break/><text:s/><text:span text:style-name="T2">annual reports for the last 10 years regarding number of cases closed by DDS (data still needs to be entered into an excel spreadsheet)</text:span></text:p>
      <text:p text:style-name="P7"/>
      <text:p text:style-name="P12">By end of year:</text:p>
      <text:p text:style-name="P11">Preparations for next contract negotiations (current contract expires on 12/2026)</text:p>
      <text:p text:style-name="P11"/>
      <text:p text:style-name="Standard"/>
      <text:p text:style-name="P13"/>
      <text:p text:style-name="P13"/>
      <text:p text:style-name="P13"/>
      <text:p text:style-name="P14">*Please do not reply to this email.</text:p>
      <text:p text:style-name="P14">**Question, comments and/ or feedback are welcomed.</text:p>
      <text:p text:style-name="P14">***if you need to reach out, Join me on Discord. </text:p>
      <text:p text:style-name="P14"><text:tab/>See below on how to sign up unanimously* I will confirm the identity of all members to ensure only members join, however said information, will not be stored or disclosed.</text:p>
      <text:p text:style-name="P15"/>
      <text:p text:style-name="P15"/>
      <text:p text:style-name="P15"/>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isability Examiner <text:s/></text:p>
      <text:p text:style-name="P17">D.D.S.</text:p>
      <text:p text:style-name="P17"/>
      <text:p text:style-name="P17"/>
      <text:p text:style-name="P17"/>
      <text:p text:style-name="P18">Stream deck shortcuts </text:p>
      <text:p text:style-name="P19"/>
      <text:p text:style-name="P19">set a screen just for coding app</text:p>
      <text:p text:style-name="P19">a screen<text:span text:style-name="T5">b</text:span> ,just for libre apps</text:p>
      <text:p text:style-name="P20"/>
      <text:p text:style-name="P20"/>
      <text:p text:style-name="P21"/>
      <text:p text:style-name="P22"/>
      <text:p text:style-name="P22"/>
      <text:p text:style-name="P22"/>
      <text:p text:style-name="P23"><text:soft-page-break/>==================================================================================================================================================</text:p>
      <text:p text:style-name="P23"/>
      <text:p text:style-name="P24">The fax failure race</text:p>
      <text:p text:style-name="P24">the incoming fax failure rate for the fax number:</text:p>
      <text:p text:style-name="P24"/>
      <text:p text:style-name="P22">1. What is the process whereby the MA Disability Determination Services (DDS) can request a letter template in NCPS be edited to reflect updated fax numbers.</text:p>
      <text:p text:style-name="P22"/>
      <text:p text:style-name="P22">2. Is the SSA aware of the height failure rate for incoming fax messages to The MA Disability Determination Services and does it have any plans to current the issue and is so what.</text:p>
      <text:p text:style-name="P22"><text:tab/>A.⁠. The fax system regularly sends a busy fax message to senders </text:p>
      <text:p text:style-name="P22"/>
      <text:p text:style-name="P25"><text:tab/>B..or it will acknowledge receipt of an incoming fax, when in fact the fax was not received or it was discarded by the system.</text:p>
      <text:p text:style-name="P26"><text:tab/></text:p>
      <text:p text:style-name="P26">C. What is the failure rate for incoming fax messages to fax numbers::</text:p>
      <text:p text:style-name="P20"/>
      <text:p text:style-name="P20"/>
      <text:p text:style-name="P27">==================================================================================================================================================</text:p>
      <text:p text:style-name="P28"/>
      <text:p text:style-name="P29"/>
      <text:p text:style-name="P30"/>
      <text:p text:style-name="P29">FILLA BLE FORMS</text:p>
      <text:p text:style-name="P29">GRIEVANCE REPORT <text:s/><text:span text:style-name="T6">P. 163</text:span></text:p>
      <text:p text:style-name="P29">APPENDIX H – PROGRAM GUIDELINES FOR ALTERNATIVE WORK OPTIONS P.173</text:p>
      <text:p text:style-name="P29">APPENDIX H-1 ALTERNATIVE WORK OPTION APPLICATION FORM P.176</text:p>
      <text:p text:style-name="P29">APPENDIX E NON-SELECTION FORM <text:span text:style-name="T6">P. 164</text:span></text:p>
      <text:p text:style-name="P29">APPENDIX G1 – F.M.L.A. FORM FOR EMPLOYEES <text:s/><text:span text:style-name="T6">P.165</text:span></text:p>
      <text:p text:style-name="P29">APPENDIX G-3 – F.M.L.A. FOR FAMILY MEMBERS <text:s/><text:span text:style-name="T6">P .169</text:span></text:p>
      <text:p text:style-name="P31" loext:marker-style-name="T7"><text:span text:style-name="T8">EMPLOYEE RELEVANT SERVICE REQUEST FORM</text:span></text:p>
      <text:p text:style-name="P32">FOR VACATION ACCRUAL STATUS ADJUSTMENT <text:s/>P. 177</text:p>
      <text:p text:style-name="P29"/>
      <text:p text:style-name="P29"/>
      <text:p text:style-name="P33" loext:marker-style-name="T9">Steward Contacts</text:p>
      <text:p text:style-name="P33" loext:marker-style-name="T9">Expanded Table of Content</text:p>
      <text:p text:style-name="P33" loext:marker-style-name="T9">Union constitution</text:p>
      <text:p text:style-name="P33" loext:marker-style-name="T9">Fillable forms</text:p>
      <text:p text:style-name="P34"/>
      <text:p text:style-name="P27">==================================================================================================================================================</text:p>
      <text:p text:style-name="P27"/>
      <text:p text:style-name="P30">Tasks:</text:p>
      <text:p text:style-name="P30">create draft email of the first chapter mailer.</text:p>
      <text:p text:style-name="P30">Create an excel spread sheet w/ the case adjudication number===or ask for help</text:p>
      <text:p text:style-name="P30"/>
      <text:p text:style-name="P30"><text:tab/><text:tab/></text:p>
      <text:p text:style-name="P30"/>
      <text:p text:style-name="P30"><text:soft-page-break/></text:p>
      <text:p text:style-name="P30">Get discord ready</text:p>
      <text:p text:style-name="P30"><text:tab/>Pull out the different sections from the contract.</text:p>
      <text:p text:style-name="P30">Resend Union wide email asking for older 509 emails, No response from Jerry.</text:p>
      <text:p text:style-name="P30"/>
      <text:p text:style-name="P30"/>
      <text:p text:style-name="P30"/>
      <text:p text:style-name="P30"/>
      <text:p text:style-name="P30"/>
      <text:p text:style-name="P30"/>
      <text:p text:style-name="P30"><text:span text:style-name="T10">==================================================================================================================================================</text:span>Emails:</text:p>
      <text:p text:style-name="P30">1.</text:p>
      <text:p text:style-name="P30"><text:tab/>DDS contract</text:p>
      <text:p text:style-name="P30"><text:tab/>original contract</text:p>
      <text:p text:style-name="P30"><text:tab/>contract covering 15 minute break</text:p>
      <text:p text:style-name="P30"><text:tab/>discord group info/invite</text:p>
      <text:p text:style-name="P30"><text:tab/>Form 30 job descriptions</text:p>
      <text:p text:style-name="P30"><text:tab/>Update on Union negotiations</text:p>
      <text:p text:style-name="P30"><text:tab/><text:span text:style-name="T11">email the first questionnaire</text:span></text:p>
      <text:p text:style-name="P30"/>
      <text:p text:style-name="P30">2.</text:p>
      <text:p text:style-name="P30"><text:s/>second email.</text:p>
      <text:p text:style-name="P30"><text:tab/>Case adjudication numbers</text:p>
      <text:p text:style-name="P30"><text:tab/>FOIA request status</text:p>
      <text:p text:style-name="P30"><text:tab/>More in depth job description of the elected stewards</text:p>
      <text:p text:style-name="P30"><text:tab/><text:tab/>Meeting minutes</text:p>
      <text:p text:style-name="P30"><text:tab/><text:tab/>Finances</text:p>
      <text:p text:style-name="P30"><text:tab/><text:tab/>Explainer of the interaction between dds and union president (Heidy)</text:p>
      <text:p text:style-name="P30"/>
      <text:p text:style-name="P30"/>
      <text:p text:style-name="P30">3. What do we want for the next contract???</text:p>
      <text:p text:style-name="P30"><text:tab/>go over the prior contracts an their lack of change</text:p>
      <text:p text:style-name="P30"><text:tab/></text:p>
      <text:p text:style-name="P30"/>
      <text:p text:style-name="P27">==================================================================================================================================================</text:p>
      <text:p text:style-name="P30"/>
      <text:p text:style-name="P35">Steward discussions:</text:p>
      <text:p text:style-name="P35"/>
      <text:p text:style-name="P35">Is the two days of picketing a final thing?</text:p>
      <text:p text:style-name="P35"><text:tab/>This should first be brought to the members.</text:p>
      <text:p text:style-name="P35"><text:tab/>Last members heard, we wanted to picked for a week</text:p>
      <text:p text:style-name="P35"><text:tab/>What are the numbers in terms of the members for/against wanting to picket?</text:p>
      <text:p text:style-name="P35"/>
      <text:p text:style-name="P35">Recap-</text:p>
      <text:p text:style-name="P35">The membership signs a letter for the commissioner- regarding the high case workload</text:p>
      <text:p text:style-name="P35">Letter present to the commissioner</text:p>
      <text:p text:style-name="P35"><text:soft-page-break/>Workload increases to 18 cases.</text:p>
      <text:p text:style-name="P35">Management made a proposal</text:p>
      <text:p text:style-name="P35">Wardis sent the email to the entire membership</text:p>
      <text:p text:style-name="P35">management withdraws the proposal.</text:p>
      <text:p text:style-name="P35">The union made a counter proposal---What was the counter proposal ---when made?</text:p>
      <text:p text:style-name="P35">Management emails the membership and mentions 20 weekly case assignments</text:p>
      <text:p text:style-name="P35">The Union sends management an email to cease communication w/ management</text:p>
      <text:p text:style-name="P35">workload is kept at 18 cases.</text:p>
      <text:p text:style-name="P35">Meeting is held for possible picketing</text:p>
      <text:p text:style-name="P35"><text:tab/>what are the goals of the picketing?</text:p>
      <text:p text:style-name="P35"><text:tab/>To bring management the negotiation table</text:p>
      <text:p text:style-name="P35"/>
      <text:p text:style-name="P35"/>
      <text:p text:style-name="P35"/>
      <text:p text:style-name="P35"/>
      <text:p text:style-name="P35"/>
      <text:p text:style-name="P35"/>
      <text:p text:style-name="P35"/>
      <text:p text:style-name="P35"/>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Pro-Regular" svg:font-family="MinionPro-Regular"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17:18:17.080257500</meta:creation-date>
    <dc:date>2025-07-07T20:08:48.960453900</dc:date>
    <meta:editing-duration>PT11H7M35S</meta:editing-duration>
    <meta:editing-cycles>10</meta:editing-cycles>
    <meta:generator>LibreOffice/25.2.4.3$Windows_X86_64 LibreOffice_project/33e196637044ead23f5c3226cde09b47731f7e27</meta:generator>
    <meta:document-statistic meta:table-count="0" meta:image-count="0" meta:object-count="0" meta:page-count="5" meta:paragraph-count="113" meta:word-count="836" meta:character-count="5762" meta:non-whitespace-character-count="4986"/>
  </office:meta>
</office:document-meta>
</file>